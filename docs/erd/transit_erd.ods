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5.184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5.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3.358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4.394cm"/>
    </style:style>
    <style:style style:name="co17" style:family="table-column">
      <style:table-column-properties fo:break-before="auto" style:column-width="5.32cm"/>
    </style:style>
    <style:style style:name="co18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5a92a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66c"/>
    </style:style>
    <style:style style:name="ce15" style:family="table-cell" style:parent-style-name="Default">
      <style:table-cell-properties fo:background-color="#5a92af"/>
    </style:style>
    <style:style style:name="ce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7bc65"/>
    </style:style>
    <style:style style:name="ce20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e994"/>
    </style:style>
    <style:style style:name="ce22" style:family="table-cell" style:parent-style-name="Default">
      <style:table-cell-properties fo:background-color="#b7b3ca"/>
    </style:style>
    <style:style style:name="ce23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a1a0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3a1a0f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b3cac7"/>
    </style:style>
    <style:style style:name="ce45" style:family="table-cell" style:parent-style-name="Default">
      <style:table-cell-properties fo:background-color="#729fcf"/>
    </style:style>
    <style:style style:name="ce46" style:family="table-cell" style:parent-style-name="Default">
      <style:table-cell-properties fo:background-color="#ffdbb6"/>
    </style:style>
    <style:style style:name="ce4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bcb4c7"/>
    </style:style>
    <style:style style:name="ce54" style:family="table-cell" style:parent-style-name="Default" style:data-style-name="N61">
      <style:table-cell-properties fo:background-color="#bcb4c7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ded4ee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0">
      <style:table-cell-properties fo:background-color="#bcb4c7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21">
      <style:table-cell-properties fo:background-color="#ded4ee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14">
      <style:table-cell-properties fo:background-color="#cccccc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c5a8ab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fo:background-color="#dde8cb"/>
    </style:style>
    <style:style style:name="ce6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c5a8ab" style:text-align-source="fix" style:repeat-content="false"/>
      <style:paragraph-properties fo:text-align="center" fo:margin-left="0cm"/>
    </style:style>
    <style:style style:name="ce66" style:family="table-cell" style:parent-style-name="Default">
      <style:text-properties fo:color="#2a6099" fo:font-weight="bold" style:font-weight-asian="bold" style:font-weight-complex="bold"/>
    </style:style>
    <style:style style:name="ce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9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72" style:family="table-cell" style:parent-style-name="Default">
      <style:table-cell-properties fo:background-color="#bcb4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2">
      <style:table-cell-properties fo:background-color="#bcb4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ransit_sche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abela (@@map)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bservações</text:p>
          </table:table-cell>
          <table:table-cell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RBAN|METROPOLITAN|RURAL|SPECIAL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OUTBOUND|INBOUND|CIRCULAR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routeId+sequence)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null → usa TravelTimeMatrix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multiplicador em horário de pico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OSRM|MANUAL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override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overrid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 (&gt;1440 = madrugada)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string[], pinnedBlock?: string }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FT|ACTIVE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fleet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eadrun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planId+blockNumber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planId+blockNumber)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blockId+sequence)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</table:table>
      <table:table table:name="erd" table:style-name="ta1"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4" table:default-cell-style-name="ce3"/>
        <table:table-column table:style-name="co14" table:default-cell-style-name="ce3"/>
        <table:table-column table:style-name="co12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DayType</text:p>
          </table:table-cell>
          <table:table-cell table:style-name="ce10" table:number-columns-repeated="2"/>
          <table:table-cell/>
          <table:table-cell table:style-name="ce6" office:value-type="string" calcext:value-type="string">
            <text:p>TransitLine</text:p>
          </table:table-cell>
          <table:table-cell table:style-name="ce4" table:number-columns-repeated="2"/>
          <table:table-cell/>
          <table:table-cell table:style-name="ce9" office:value-type="string" calcext:value-type="string">
            <text:p>RouteLocality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ce38" office:value-type="string" calcext:value-type="string">
            <text:p>LineGroup</text:p>
          </table:table-cell>
          <table:table-cell table:style-name="ce39" table:number-columns-repeated="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/>
          <table:table-cell table:style-name="ce13" office:value-type="string" calcext:value-type="string">
            <text:p>routeId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FK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1" office:value-type="string" calcext:value-type="string">
            <text:p>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/>
          <table:table-cell table:style-name="ce3" office:value-type="string" calcext:value-type="string">
            <text:p>branchId</text:p>
          </table:table-cell>
          <table:table-cell table:style-name="ce3" office:value-type="string" calcext:value-type="string">
            <text:p>String?</text:p>
          </table:table-cell>
          <table:table-cell table:style-name="ce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routeId+sequence)</text:p>
          </table:table-cell>
          <table:table-cell/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tring</text:p>
          </table:table-cell>
          <table:table-cell table:style-name="ce3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Branch?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LineGroupLine[]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@grupo de linhas com branch optional, permite agrupar linhas para uma empr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ou grupo de linhas multi-empr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 (Cascade)</text:p>
          </table:table-cell>
          <table:table-cell/>
          <table:table-cell table:style-name="ce9" office:value-type="string" calcext:value-type="string">
            <text:p>LineGroupLin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</table:table-row>
        <table:table-row table:style-name="ro1"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ineGroups</text:p>
          </table:table-cell>
          <table:table-cell office:value-type="string" calcext:value-type="string">
            <text:p>LineGroupLine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ponto de referencia de uma linha, pode ser o ponto de origem ou ponto de</text:p>
          </table:table-cell>
          <table:table-cell table:style-name="Default" table:number-columns-repeated="2"/>
          <table:table-cell/>
          <table:table-cell table:style-name="ce39" office:value-type="string" calcext:value-type="string">
            <text:p>lineGroupId</text:p>
          </table:table-cell>
          <table:table-cell table:style-name="ce39" office:value-type="string" calcext:value-type="string">
            <text:p>String</text:p>
          </table:table-cell>
          <table:table-cell table:style-name="ce39"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linha de onibus, não tem amarração com empresa / filial, engine pode atribui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ferência, allowsCrewChange = true força engine a calcular tempo e km na <text:s/>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FK</text:p>
          </table:table-cell>
        </table:table-row>
        <table:table-row table:style-name="ro1">
          <table:table-cell table:style-name="Default" office:value-type="string" calcext:value-type="string">
            <text:p>@tipo de dia, permite diferenciar dias da semana e mês, pattern = nul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empresa (caso permitido pelo planejador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TravelTimeMatrix</text:p>
          </table:table-cell>
          <table:table-cell table:style-name="Default" table:number-columns-repeated="2"/>
          <table:table-cell/>
          <table:table-cell office:value-type="string" calcext:value-type="string">
            <text:p>@tabela de associação de LineGroup a TransitLin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pera associação manual na geração (Ferias, Especial, etc)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18" office:value-type="string" calcext:value-type="string">
            <text:p>VehiclePlan</text:p>
          </table:table-cell>
          <table:table-cell table:style-name="ce19" table:number-columns-repeated="2"/>
          <table:table-cell/>
          <table:table-cell table:style-name="ce23" office:value-type="string" calcext:value-type="string">
            <text:p>TransitRoute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>
            <text:p>LineCalendarException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10" office:value-type="string" calcext:value-type="string">
            <text:p>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DRAFT|ACTIVE</text:p>
          </table:table-cell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ource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21" office:value-type="string" calcext:value-type="string">
            <text:p>origin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override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/>
          <table:table-cell table:style-name="ce21" office:value-type="string" calcext:value-type="string">
            <text:p>destination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@resultado de uma execução do solver para um DayType, agrupa os VehicleBlock</text:p>
          </table:table-cell>
          <table:table-cell table:style-name="Default" table:number-columns-repeated="2"/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gerados sem amarração de empresa. Atribuição de empresa acontece no VehicleBlock</text:p>
          </table:table-cell>
          <table:table-cell table:style-name="Default" table:number-columns-repeated="2"/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nes</text:p>
          </table:table-cell>
          <table:table-cell table:style-name="ce4" office:value-type="string" calcext:value-type="string">
            <text:p>LineCalendarExceptionLine[]</text:p>
          </table:table-cell>
          <table:table-cell table:style-name="ce4" office:value-type="string" calcext:value-type="string">
            <text:p>relation</text:p>
          </table:table-cell>
          <table:table-cell/>
          <table:table-cell table:style-name="ce9" office:value-type="string" calcext:value-type="string">
            <text:p>VehiclePlanLin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/>
          <table:table-cell table:style-name="ce19" office:value-type="string" calcext:value-type="string">
            <text:p>vehiclePlanId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PK (composto), FK</text:p>
          </table:table-cell>
          <table:table-cell/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office:value-type="string" calcext:value-type="string">
            <text:p>relation (Cascade)</text:p>
          </table:table-cell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PK (composto), FK</text:p>
          </table:table-cell>
          <table:table-cell/>
          <table:table-cell table:style-name="Default" office:value-type="string" calcext:value-type="string">
            <text:p>@rota (sentido) de uma linh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@registra periodo de exceção, tem precedencia no engine para definição</text:p>
          </table:table-cell>
          <table:table-cell table:style-name="Default" table:number-columns-repeated="2"/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do daytype, </text:span>se existe definição de exceção para linha usa ela, se não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@agrupa VehiclePlan – VehicleBlock, para agilizar consulta nas telas</text:p>
          </table:table-cell>
          <table:table-cell table:style-name="Default" table:number-columns-repeated="2"/>
          <table:table-cell/>
          <table:table-cell table:style-name="ce24" office:value-type="string" calcext:value-type="string">
            <text:p>TransitLocality</text:p>
          </table:table-cell>
          <table:table-cell table:style-name="ce2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assume default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 planejamento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TransitTrip</text:p>
          </table:table-cell>
          <table:table-cell table:style-name="ce15" table:number-columns-repeated="2"/>
          <table:table-cell/>
          <table:table-cell table:style-name="ce20" office:value-type="string" calcext:value-type="string">
            <text:p>VehicleBlock</text:p>
          </table:table-cell>
          <table:table-cell table:style-name="ce22" table:number-columns-repeated="2"/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routeId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FK</text:p>
          </table:table-cell>
          <table:table-cell/>
          <table:table-cell table:style-name="ce19" office:value-type="string" calcext:value-type="string">
            <text:p>vehiclePlanId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FK, unique(planId+blockNumber)</text:p>
          </table:table-cell>
          <table:table-cell/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planId+blockNumber)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table:number-columns-repeated="2"/>
          <table:table-cell table:style-name="ce21" office:value-type="string" calcext:value-type="string">
            <text:p>depot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sSta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@default(false)</text:p>
          </table:table-cell>
          <table:table-cell/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/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/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@atomo que o solver consome para montar os blocos de veículo,</text:p>
          </table:table-cell>
          <table:table-cell table:style-name="Default" table:number-columns-repeated="2"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ponto nomeado da rede, terminal, parada de referência ou garagem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representa uma viagem “solta” nos projetos, referencia uma linha e</text:p>
          </table:table-cell>
          <table:table-cell table:style-name="Default" table:number-columns-repeated="2"/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Global, sem vínculo com empresa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ode estar referenciado em N DayTypes via [ TripDayType ]</text:p>
          </table:table-cell>
          <table:table-cell table:style-name="Default" table:number-columns-repeated="2"/>
          <table:table-cell/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@sequência de viagens executadas por um único veículo em um dia operacional, </text:p>
          </table:table-cell>
          <table:table-cell table:style-name="Default" table:number-columns-repeated="2"/>
          <table:table-cell/>
          <table:table-cell table:style-name="ce9" office:value-type="string" calcext:value-type="string">
            <text:p>TravelTimeMatrix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ripDayTyp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Default" office:value-type="string" calcext:value-type="string">
            <text:p>sai da garagem, cumpre N viagens em ordem, retorna. Aqui entra a empresa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Default" office:value-type="string" calcext:value-type="string">
            <text:p>responsável por alocar o veículo</text:p>
          </table:table-cell>
          <table:table-cell table:style-name="Default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tripId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K</text:p>
          </table:table-cell>
          <table:table-cell/>
          <table:table-cell table:style-name="Default" table:number-columns-repeated="3"/>
          <table:table-cell/>
          <table:table-cell table:style-name="ce21" office:value-type="string" calcext:value-type="string">
            <text:p>origin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, unique(origin+dest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table:style-name="ce9" office:value-type="string" calcext:value-type="string">
            <text:p>BlockTrip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ce21" office:value-type="string" calcext:value-type="string">
            <text:p>destination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, unique(origin+dest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@tabela de associação de TransitTrip aos DayTypes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22" office:value-type="string" calcext:value-type="string">
            <text:p>vehicleBlockI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FK</text:p>
          </table:table-cell>
          <table:table-cell/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ultiplicador em horário de pico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15" office:value-type="string" calcext:value-type="string">
            <text:p>tripId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K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OSRM|MANUAL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blockId+sequence)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@ Matriz global de tempo e distância entre pares de localidades, alimenta o solv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para cálculo de dead runs e serve de fallback para itinerários sem delta manual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relation (Cascade)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@uma viagem dentro de um bloco de veículo, comercial ou em vazio, com sua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posição na sequência e dados do deslocamento morto quando aplicáve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TransitConfig" table:style-name="ta1">
        <table:table-column table:style-name="co9" table:number-columns-repeated="2" table:default-cell-style-name="Default"/>
        <table:table-column table:style-name="co9" table:number-columns-repeated="2" table:default-cell-style-name="ce52"/>
        <table:table-column table:style-name="co9" table:default-cell-style-name="ce59"/>
        <table:table-column table:style-name="co9" table:default-cell-style-name="ce61"/>
        <table:table-column table:style-name="co9" table:number-columns-repeated="3" table:default-cell-style-name="ce51"/>
        <table:table-column table:style-name="co9" table:number-columns-repeated="2" table:default-cell-style-name="Default"/>
        <table:table-column table:style-name="co9" table:default-cell-style-name="ce51"/>
        <table:table-column table:style-name="co9" table:default-cell-style-name="ce71"/>
        <table:table-column table:style-name="co9" table:default-cell-style-name="ce73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row table:style-name="ro2">
          <table:table-cell table:style-name="ce42" office:value-type="string" calcext:value-type="string">
            <text:p>TransitConfig</text:p>
          </table:table-cell>
          <table:table-cell/>
          <table:table-cell table:style-name="Default" table:number-columns-repeated="2"/>
          <table:table-cell table:style-name="ce53" office:value-type="string" calcext:value-type="string">
            <text:p>Conversor H → M</text:p>
          </table:table-cell>
          <table:table-cell table:style-name="ce53" table:number-columns-repeated="3"/>
          <table:table-cell table:style-name="Default"/>
          <table:table-cell table:style-name="ce42" office:value-type="string" calcext:value-type="string">
            <text:p>Methodology</text:p>
          </table:table-cell>
          <table:table-cell/>
          <table:table-cell table:style-name="Default" table:number-columns-repeated="3"/>
          <table:table-cell table:number-columns-repeated="2"/>
          <table:table-cell table:style-name="ce42" office:value-type="string" calcext:value-type="string">
            <text:p>Validati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4" office:value-type="time" office:time-value="PT01H00M00S" calcext:value-type="time">
            <text:p>01:00:00</text:p>
          </table:table-cell>
          <table:table-cell table:style-name="ce54" office:value-type="time" office:time-value="PT05H00M00S" calcext:value-type="time">
            <text:p>05:00:00</text:p>
          </table:table-cell>
          <table:table-cell table:style-name="ce54" office:value-type="time" office:time-value="PT04H30M00S" calcext:value-type="time">
            <text:p>04:30:00</text:p>
          </table:table-cell>
          <table:table-cell table:style-name="ce54" office:value-type="time" office:time-value="PT11H00M00S" calcext:value-type="time">
            <text:p>11:00:00</text:p>
          </table:table-cell>
          <table:table-cell table:style-name="Default"/>
          <table:table-cell table:style-name="ce66" office:value-type="string" calcext:value-type="string">
            <text:p>Linear Scoring Methodology by Sections with Exponential Penalty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Version:</text:p>
          </table:table-cell>
          <table:table-cell table:style-name="ce47" office:value-type="string" calcext:value-type="string">
            <text:p>2.0</text:p>
          </table:table-cell>
          <table:table-cell table:style-name="Default" table:number-columns-repeated="2"/>
          <table:table-cell table:style-name="ce55" table:formula="of:=[.E2]*1440" office:value-type="float" office:value="60" calcext:value-type="float">
            <text:p>60</text:p>
          </table:table-cell>
          <table:table-cell table:style-name="ce55" table:formula="of:=[.F2]*1440" office:value-type="float" office:value="300" calcext:value-type="float">
            <text:p>300</text:p>
          </table:table-cell>
          <table:table-cell table:style-name="ce55" table:formula="of:=[.G2]*1440" office:value-type="float" office:value="270" calcext:value-type="float">
            <text:p>270</text:p>
          </table:table-cell>
          <table:table-cell table:style-name="ce55" table:formula="of:=[.H2]*1440" office:value-type="float" office:value="660" calcext:value-type="float">
            <text:p>660</text:p>
          </table:table-cell>
          <table:table-cell table:style-name="Default"/>
          <table:table-cell table:style-name="ce67" office:value-type="string" calcext:value-type="string">
            <text:p>Range</text:p>
          </table:table-cell>
          <table:table-cell table:style-name="ce67" office:value-type="string" calcext:value-type="string">
            <text:p>Variation</text:p>
          </table:table-cell>
          <table:table-cell table:style-name="ce69" office:value-type="string" calcext:value-type="string">
            <text:p>Formul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eiling &gt; 0</text:p>
          </table:table-cell>
        </table:table-row>
        <table:table-row table:style-name="ro1">
          <table:table-cell office:value-type="string" calcext:value-type="string">
            <text:p>Release:</text:p>
          </table:table-cell>
          <table:table-cell table:style-name="ce48" office:value-type="date" office:date-value="2026-06-06" calcext:value-type="date">
            <text:p>06/06/26</text:p>
          </table:table-cell>
          <table:table-cell table:style-name="Default" table:number-columns-repeated="7"/>
          <table:table-cell office:value-type="string" calcext:value-type="string">
            <text:p>floor</text:p>
          </table:table-cell>
          <table:table-cell table:style-name="ce68" office:value-type="string" calcext:value-type="string">
            <text:p>0-99</text:p>
          </table:table-cell>
          <table:table-cell table:style-name="ce70" office:value-type="string" calcext:value-type="string">
            <text:p>( value - floor ) <text:s/>/ ( min - floor ) * 1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3" office:value-type="string" calcext:value-type="string">
            <text:p>Conversor M → H</text:p>
          </table:table-cell>
          <table:table-cell table:style-name="ce53" table:number-columns-repeated="3"/>
          <table:table-cell table:style-name="Default"/>
          <table:table-cell office:value-type="string" calcext:value-type="string">
            <text:p>min</text:p>
          </table:table-cell>
          <table:table-cell table:style-name="ce68" office:value-type="float" office:value="100" calcext:value-type="float">
            <text:p>100</text:p>
          </table:table-cell>
          <table:table-cell table:style-name="ce58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@general settings, no effect on score calculation</text:p>
          </table:table-cell>
          <table:table-cell/>
          <table:table-cell table:style-name="Default" table:number-columns-repeated="2"/>
          <table:table-cell table:style-name="ce56" office:value-type="float" office:value="1440" calcext:value-type="float">
            <text:p>1440</text:p>
          </table:table-cell>
          <table:table-cell table:style-name="ce56" office:value-type="float" office:value="560" calcext:value-type="float">
            <text:p>560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max</text:p>
          </table:table-cell>
          <table:table-cell table:style-name="ce68" office:value-type="float" office:value="100" calcext:value-type="float">
            <text:p>100</text:p>
          </table:table-cell>
          <table:table-cell table:style-name="ce58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4" office:value-type="string" calcext:value-type="string">
            <text:p>General</text:p>
          </table:table-cell>
          <table:table-cell table:style-name="ce44"/>
          <table:table-cell table:style-name="ce50" office:value-type="string" calcext:value-type="string">
            <text:p>default</text:p>
          </table:table-cell>
          <table:table-cell table:style-name="Default"/>
          <table:table-cell table:style-name="ce57" table:formula="of:=[.E6]/1440" office:value-type="time" office:time-value="PT24H00M00S" calcext:value-type="time">
            <text:p>24:00</text:p>
          </table:table-cell>
          <table:table-cell table:style-name="ce57" table:formula="of:=[.F6]/1440" office:value-type="time" office:time-value="PT09H20M00S" calcext:value-type="time">
            <text:p>09:20</text:p>
          </table:table-cell>
          <table:table-cell table:style-name="ce57" table:formula="of:=[.G6]/1440" office:value-type="time" office:time-value="PT00H00M00S" calcext:value-type="time">
            <text:p>00:00</text:p>
          </table:table-cell>
          <table:table-cell table:style-name="ce57" table:formula="of:=[.H6]/1440" office:value-type="time" office:time-value="PT00H00M00S" calcext:value-type="time">
            <text:p>00:00</text:p>
          </table:table-cell>
          <table:table-cell table:style-name="Default"/>
          <table:table-cell office:value-type="string" calcext:value-type="string">
            <text:p>ceiling</text:p>
          </table:table-cell>
          <table:table-cell table:style-name="ce68" office:value-type="string" calcext:value-type="string">
            <text:p>0-99</text:p>
          </table:table-cell>
          <table:table-cell table:style-name="ce70" office:value-type="string" calcext:value-type="string">
            <text:p>( value - floor ) <text:s/>/ ( min - floor ) * 1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operationalDayStartHour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Default"/>
          <table:table-cell table:style-name="ce5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8"/>
          <table:table-cell table:style-name="Default" table:number-columns-repeated="4"/>
          <table:table-cell table:style-name="ce9" office:value-type="string" calcext:value-type="string">
            <text:p>modifier:</text:p>
          </table:table-cell>
          <table:table-cell table:style-name="ce5" office:value-type="string" calcext:value-type="string">
            <text:p>Larger modifier = Larger score N Larger penalty (exponential scale)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@planning settings, effect planning scope</text:p>
          </table:table-cell>
          <table:table-cell/>
          <table:table-cell table:style-name="Default" table:number-columns-repeated="2"/>
          <table:table-cell table:style-name="ce51"/>
          <table:table-cell table:style-name="Default"/>
          <table:table-cell table:style-name="ce62" office:value-type="string" calcext:value-type="string">
            <text:p>idealRange</text:p>
          </table:table-cell>
          <table:table-cell table:style-name="ce62"/>
          <table:table-cell table:style-name="ce64" office:value-type="string" calcext:value-type="string">
            <text:p>[ min: 1 ]</text:p>
          </table:table-cell>
          <table:table-cell table:number-columns-repeated="2"/>
          <table:table-cell table:style-name="ce53" office:value-type="string" calcext:value-type="string">
            <text:p>SIMULATOR</text:p>
          </table:table-cell>
          <table:table-cell table:style-name="ce53"/>
          <table:table-cell table:style-name="ce72" office:value-type="string" calcext:value-type="string">
            <text:p>MAX SCORE:</text:p>
          </table:table-cell>
          <table:table-cell table:style-name="ce75" table:formula="of:=SUM([.E13:.E20])*100" office:value-type="float" office:value="430" calcext:value-type="float">
            <text:p>430,00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Planning</text:p>
          </table:table-cell>
          <table:table-cell table:style-name="ce45"/>
          <table:table-cell office:value-type="string" calcext:value-type="string">
            <text:p>type</text:p>
          </table:table-cell>
          <table:table-cell office:value-type="string" calcext:value-type="string">
            <text:p>active</text:p>
          </table:table-cell>
          <table:table-cell table:style-name="ce47" office:value-type="string" calcext:value-type="string">
            <text:p>modifier</text:p>
          </table:table-cell>
          <table:table-cell table:style-name="ce60" office:value-type="string" calcext:value-type="string">
            <text:p>floor</text:p>
          </table:table-cell>
          <table:table-cell table:style-name="ce63" office:value-type="string" calcext:value-type="string">
            <text:p>min</text:p>
          </table:table-cell>
          <table:table-cell table:style-name="ce63" office:value-type="string" calcext:value-type="string">
            <text:p>max</text:p>
          </table:table-cell>
          <table:table-cell table:style-name="ce65"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table:style-name="ce51" office:value-type="string" calcext:value-type="string">
            <text:p>Case</text:p>
          </table:table-cell>
          <table:table-cell table:style-name="ce49" office:value-type="string" calcext:value-type="string">
            <text:p>Score Base</text:p>
          </table:table-cell>
          <table:table-cell table:style-name="ce76" office:value-type="string" calcext:value-type="string">
            <text:p>Score</text:p>
          </table:table-cell>
          <table:table-cell/>
          <table:table-cell table:style-name="ce69"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lineTransf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line changes</text:p>
          </table:table-cell>
          <table:table-cell table:number-columns-repeated="2"/>
          <table:table-cell table:formula="of:=IF(OR([.L13]&lt;[.F13];[.L13]&gt;[.I13]);-1; IF([.L13]&lt;[.G13]; 2; IF([.L13]&lt;=[.H13]; 3; 4)))" office:value-type="float" office:value="3" calcext:value-type="float">
            <text:p>3</text:p>
          </table:table-cell>
          <table:table-cell table:formula="of:=IF([.M13]=-1; IF([.L13]&gt;[.I13]; -(([.L13]-[.I13])/[.I13])*100; -(([.F13]-[.L13])/[.F13])*100); IF([.M13]=2; (([.L13]-[.F13])/([.G13]-[.F13]))*100; IF([.M13]=3; 100; (([.I13]-[.L13])/([.I13]-[.H13]))*100)))" office:value-type="float" office:value="100" calcext:value-type="float">
            <text:p>100,00</text:p>
          </table:table-cell>
          <table:table-cell table:style-name="ce77" table:formula="of:=[.N13] * [.E13]" office:value-type="float" office:value="100" calcext:value-type="float">
            <text:p>100,00</text:p>
          </table:table-cell>
          <table:table-cell/>
          <table:table-cell office:value-type="string" calcext:value-type="string">
            <text:p>-1 = Outside tolerance range (Less than floor OR greater than ceiling)</text:p>
          </table:table-cell>
        </table:table-row>
        <table:table-row table:style-name="ro1">
          <table:table-cell office:value-type="string" calcext:value-type="string">
            <text:p>tripInterval</text:p>
          </table:table-cell>
          <table:table-cell table:style-name="ce49" office:value-type="string" calcext:value-type="string">
            <text:p>**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@interv btw trips</text:p>
          </table:table-cell>
          <table:table-cell table:number-columns-repeated="2"/>
          <table:table-cell table:formula="of:=IF(OR([.L14]&lt;[.F14];[.L14]&gt;[.I14]);-1; IF([.L14]&lt;[.G14]; 2; IF([.L14]&lt;=[.H14]; 3; 4)))" office:value-type="float" office:value="-1" calcext:value-type="float">
            <text:p>-1</text:p>
          </table:table-cell>
          <table:table-cell table:formula="of:=IF([.M14]=-1; IF([.L14]&gt;[.I14]; -(([.L14]-[.I14])/[.I14])*100; -(([.F14]-[.L14])/[.F14])*100); IF([.M14]=2; (([.L14]-[.F14])/([.G14]-[.F14]))*100; IF([.M14]=3; 100; (([.I14]-[.L14])/([.I14]-[.H14]))*100)))" office:value-type="float" office:value="-100" calcext:value-type="float">
            <text:p>-100,00</text:p>
          </table:table-cell>
          <table:table-cell table:style-name="ce77" table:formula="of:=[.N14] * [.E14]" office:value-type="float" office:value="-30" calcext:value-type="float">
            <text:p>-30,00</text:p>
          </table:table-cell>
          <table:table-cell/>
          <table:table-cell office:value-type="string" calcext:value-type="string">
            <text:p>2 = Lower zone (Acceptable)</text:p>
          </table:table-cell>
        </table:table-row>
        <table:table-row table:style-name="ro1">
          <table:table-cell office:value-type="string" calcext:value-type="string">
            <text:p>distributionVarianc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@deviation from mean</text:p>
          </table:table-cell>
          <table:table-cell table:number-columns-repeated="2"/>
          <table:table-cell table:formula="of:=IF(OR([.L15]&lt;[.F15];[.L15]&gt;[.I15]);-1; IF([.L15]&lt;[.G15]; 2; IF([.L15]&lt;=[.H15]; 3; 4)))" office:value-type="float" office:value="2" calcext:value-type="float">
            <text:p>2</text:p>
          </table:table-cell>
          <table:table-cell table:formula="of:=IF([.M15]=-1; IF([.L15]&gt;[.I15]; -(([.L15]-[.I15])/[.I15])*100; -(([.F15]-[.L15])/[.F15])*100); IF([.M15]=2; (([.L15]-[.F15])/([.G15]-[.F15]))*100; IF([.M15]=3; 100; (([.I15]-[.L15])/([.I15]-[.H15]))*100)))" office:value-type="float" office:value="0" calcext:value-type="float">
            <text:p>0,00</text:p>
          </table:table-cell>
          <table:table-cell table:style-name="ce77" table:formula="of:=[.N15] * [.E15]" office:value-type="float" office:value="0" calcext:value-type="float">
            <text:p>0,00</text:p>
          </table:table-cell>
          <table:table-cell/>
          <table:table-cell office:value-type="string" calcext:value-type="string">
            <text:p>3 = Ideal range</text:p>
          </table:table-cell>
        </table:table-row>
        <table:table-row table:style-name="ro1">
          <table:table-cell office:value-type="string" calcext:value-type="string">
            <text:p>deadrunRatio</text:p>
          </table:table-cell>
          <table:table-cell/>
          <table:table-cell office:value-type="string" calcext:value-type="string">
            <text:p>per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deadrun percent</text:p>
          </table:table-cell>
          <table:table-cell table:number-columns-repeated="2"/>
          <table:table-cell table:formula="of:=IF(OR([.L16]&lt;[.F16];[.L16]&gt;[.I16]);-1; IF([.L16]&lt;[.G16]; 2; IF([.L16]&lt;=[.H16]; 3; 4)))" office:value-type="float" office:value="3" calcext:value-type="float">
            <text:p>3</text:p>
          </table:table-cell>
          <table:table-cell table:formula="of:=IF([.M16]=-1; IF([.L16]&gt;[.I16]; -(([.L16]-[.I16])/[.I16])*100; -(([.F16]-[.L16])/[.F16])*100); IF([.M16]=2; (([.L16]-[.F16])/([.G16]-[.F16]))*100; IF([.M16]=3; 100; (([.I16]-[.L16])/([.I16]-[.H16]))*100)))" office:value-type="float" office:value="100" calcext:value-type="float">
            <text:p>100,00</text:p>
          </table:table-cell>
          <table:table-cell table:style-name="ce77" table:formula="of:=[.N16] * [.E16]" office:value-type="float" office:value="100" calcext:value-type="float">
            <text:p>100,00</text:p>
          </table:table-cell>
          <table:table-cell/>
          <table:table-cell office:value-type="string" calcext:value-type="string">
            <text:p>4 = Upper Zone (Acceptable)</text:p>
          </table:table-cell>
        </table:table-row>
        <table:table-row table:style-name="ro1">
          <table:table-cell office:value-type="string" calcext:value-type="string">
            <text:p>techAdherence</text:p>
          </table:table-cell>
          <table:table-cell/>
          <table:table-cell office:value-type="string" calcext:value-type="string">
            <text:p>per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@tech (fleet) adherence</text:p>
          </table:table-cell>
          <table:table-cell table:number-columns-repeated="2"/>
          <table:table-cell table:formula="of:=IF(OR([.L17]&lt;[.F17];[.L17]&gt;[.I17]);-1; IF([.L17]&lt;[.G17]; 2; IF([.L17]&lt;=[.H17]; 3; 4)))" office:value-type="float" office:value="-1" calcext:value-type="float">
            <text:p>-1</text:p>
          </table:table-cell>
          <table:table-cell table:formula="of:=IF([.M17]=-1; IF([.L17]&gt;[.I17]; -(([.L17]-[.I17])/[.I17])*100; -(([.F17]-[.L17])/[.F17])*100); IF([.M17]=2; (([.L17]-[.F17])/([.G17]-[.F17]))*100; IF([.M17]=3; 100; (([.I17]-[.L17])/([.I17]-[.H17]))*100)))" office:value-type="float" office:value="-100" calcext:value-type="float">
            <text:p>-100,00</text:p>
          </table:table-cell>
          <table:table-cell table:style-name="ce77" table:formula="of:=[.N17] * [.E17]" office:value-type="float" office:value="-100" calcext:value-type="float">
            <text:p>-100,00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  <table:table-cell table:style-name="ce77"/>
          <table:table-cell table:number-columns-repeated="2"/>
        </table:table-row>
        <table:table-row table:style-name="ro1">
          <table:table-cell table:number-columns-repeated="2"/>
          <table:table-cell table:style-name="ce51" table:number-columns-repeated="4"/>
          <table:table-cell table:number-columns-repeated="2"/>
          <table:table-cell table:style-name="Default"/>
          <table:table-cell table:number-columns-repeated="3"/>
          <table:table-cell table:style-name="ce51"/>
          <table:table-cell table:style-name="ce74"/>
          <table:table-cell table:number-columns-repeated="3"/>
        </table:table-row>
        <table:table-row table:style-name="ro1">
          <table:table-cell table:number-columns-repeated="2"/>
          <table:table-cell table:style-name="ce51" table:number-columns-repeated="4"/>
          <table:table-cell table:number-columns-repeated="2"/>
          <table:table-cell table:style-name="Default"/>
          <table:table-cell table:number-columns-repeated="3"/>
          <table:table-cell table:style-name="ce5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@schedule settings, effect schedule scope</text:p>
          </table:table-cell>
          <table:table-cell/>
          <table:table-cell table:style-name="Default" table:number-columns-repeated="2"/>
          <table:table-cell table:style-name="ce51" table:number-columns-repeated="2"/>
          <table:table-cell table:number-columns-repeated="2"/>
          <table:table-cell table:style-name="Default"/>
          <table:table-cell table:number-columns-repeated="2"/>
          <table:table-cell table:style-name="ce53" office:value-type="string" calcext:value-type="string">
            <text:p>SIMULATOR</text:p>
          </table:table-cell>
          <table:table-cell table:style-name="ce53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Schedule</text:p>
          </table:table-cell>
          <table:table-cell table:style-name="ce46"/>
          <table:table-cell office:value-type="string" calcext:value-type="string">
            <text:p>type</text:p>
          </table:table-cell>
          <table:table-cell office:value-type="string" calcext:value-type="string">
            <text:p>active</text:p>
          </table:table-cell>
          <table:table-cell table:style-name="ce47" office:value-type="string" calcext:value-type="string">
            <text:p>modifier</text:p>
          </table:table-cell>
          <table:table-cell table:style-name="ce60" office:value-type="string" calcext:value-type="string">
            <text:p>floor</text:p>
          </table:table-cell>
          <table:table-cell table:style-name="ce63" office:value-type="string" calcext:value-type="string">
            <text:p>min</text:p>
          </table:table-cell>
          <table:table-cell table:style-name="ce63" office:value-type="string" calcext:value-type="string">
            <text:p>max</text:p>
          </table:table-cell>
          <table:table-cell table:style-name="ce65"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table:style-name="ce51" office:value-type="string" calcext:value-type="string">
            <text:p>Case</text:p>
          </table:table-cell>
          <table:table-cell table:style-name="ce49" office:value-type="string" calcext:value-type="string">
            <text:p>Score Base</text:p>
          </table:table-cell>
          <table:table-cell table:style-name="ce76" office:value-type="string" calcext:value-type="string">
            <text:p>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ov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@work schedule</text:p>
          </table:table-cell>
          <table:table-cell table:number-columns-repeated="2"/>
          <table:table-cell table:formula="of:=IF(OR([.L25]&lt;[.F25];[.L25]&gt;[.I25]);-1; IF([.L25]&lt;[.G25]; 2; IF([.L25]&lt;=[.H25]; 3; 4)))" office:value-type="float" office:value="-1" calcext:value-type="float">
            <text:p>-1</text:p>
          </table:table-cell>
          <table:table-cell table:formula="of:=IF([.M25]=-1; IF([.L25]&gt;[.I25]; -(([.L25]-[.I25])/[.I25])*100; -(([.F25]-[.L25])/[.F25])*100); IF([.M25]=2; (([.L25]-[.F25])/([.G25]-[.F25]))*100; IF([.M25]=3; 100; (([.I25]-[.L25])/([.I25]-[.H25]))*100)))" office:value-type="float" office:value="-100" calcext:value-type="float">
            <text:p>-100,00</text:p>
          </table:table-cell>
          <table:table-cell table:style-name="ce77" table:formula="of:=[.N25] * [.E25]" office:value-type="float" office:value="-100" calcext:value-type="float">
            <text:p>-100,00</text:p>
          </table:table-cell>
          <table:table-cell/>
          <table:table-cell office:value-type="string" calcext:value-type="string">
            <text:p>driverPrefShiftStart</text:p>
          </table:table-cell>
        </table:table-row>
        <table:table-row table:style-name="ro1">
          <table:table-cell office:value-type="string" calcext:value-type="string">
            <text:p>shiftBreak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@breakInterval</text:p>
          </table:table-cell>
          <table:table-cell table:number-columns-repeated="2"/>
          <table:table-cell table:formula="of:=IF(OR([.L26]&lt;[.F26];[.L26]&gt;[.I26]);-1; IF([.L26]&lt;[.G26]; 2; IF([.L26]&lt;=[.H26]; 3; 4)))" office:value-type="float" office:value="-1" calcext:value-type="float">
            <text:p>-1</text:p>
          </table:table-cell>
          <table:table-cell table:formula="of:=IF([.M26]=-1; IF([.L26]&gt;[.I26]; -(([.L26]-[.I26])/[.I26])*100; -(([.F26]-[.L26])/[.F26])*100); IF([.M26]=2; (([.L26]-[.F26])/([.G26]-[.F26]))*100; IF([.M26]=3; 100; (([.I26]-[.L26])/([.I26]-[.H26]))*100)))" office:value-type="float" office:value="-100" calcext:value-type="float">
            <text:p>-100,00</text:p>
          </table:table-cell>
          <table:table-cell table:style-name="ce77" table:formula="of:=[.N26] * [.E26]" office:value-type="float" office:value="-100" calcext:value-type="float">
            <text:p>-100,00</text:p>
          </table:table-cell>
          <table:table-cell/>
          <table:table-cell office:value-type="string" calcext:value-type="string">
            <text:p>driverPrefShiftEnd</text:p>
          </table:table-cell>
        </table:table-row>
        <table:table-row table:style-name="ro1">
          <table:table-cell office:value-type="string" calcext:value-type="string">
            <text:p>interShiftRest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table:style-name="ce51" office:value-type="float" office:value="600" calcext:value-type="float">
            <text:p>600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string" calcext:value-type="string">
            <text:p>@min btw work days</text:p>
          </table:table-cell>
          <table:table-cell/>
          <table:table-cell table:style-name="Default"/>
          <table:table-cell table:formula="of:=IF(OR([.L27]&lt;[.F27];[.L27]&gt;[.I27]);-1; IF([.L27]&lt;[.G27]; 2; IF([.L27]&lt;=[.H27]; 3; 4)))" office:value-type="float" office:value="-1" calcext:value-type="float">
            <text:p>-1</text:p>
          </table:table-cell>
          <table:table-cell table:formula="of:=IF([.M27]=-1; IF([.L27]&gt;[.I27]; -(([.L27]-[.I27])/[.I27])*100; -(([.F27]-[.L27])/[.F27])*100); IF([.M27]=2; (([.L27]-[.F27])/([.G27]-[.F27]))*100; IF([.M27]=3; 100; (([.I27]-[.L27])/([.I27]-[.H27]))*100)))" office:value-type="float" office:value="-100" calcext:value-type="float">
            <text:p>-100,00</text:p>
          </table:table-cell>
          <table:table-cell table:style-name="ce77" table:formula="of:=[.N27] * [.E27]" office:value-type="float" office:value="-100" calcext:value-type="float">
            <text:p>-1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ShiftInterval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table:style-name="ce5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@double shift interv</text:p>
          </table:table-cell>
          <table:table-cell/>
          <table:table-cell table:style-name="Default"/>
          <table:table-cell table:formula="of:=IF(OR([.L28]&lt;[.F28];[.L28]&gt;[.I28]);-1; IF([.L28]&lt;[.G28]; 2; IF([.L28]&lt;=[.H28]; 3; 4)))" office:value-type="float" office:value="-1" calcext:value-type="float">
            <text:p>-1</text:p>
          </table:table-cell>
          <table:table-cell table:formula="of:=IF([.M28]=-1; IF([.L28]&gt;[.I28]; -(([.L28]-[.I28])/[.I28])*100; -(([.F28]-[.L28])/[.F28])*100); IF([.M28]=2; (([.L28]-[.F28])/([.G28]-[.F28]))*100; IF([.M28]=3; 100; (([.I28]-[.L28])/([.I28]-[.H28]))*100)))" office:value-type="float" office:value="-100" calcext:value-type="float">
            <text:p>-100,00</text:p>
          </table:table-cell>
          <table:table-cell table:style-name="ce77" table:formula="of:=[.N28] * [.E28]" office:value-type="float" office:value="-100" calcext:value-type="float">
            <text:p>-1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PrefLine</text:p>
          </table:table-cell>
          <table:table-cell/>
          <table:table-cell office:value-type="string" calcext:value-type="string">
            <text:p>per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table:style-name="ce51"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@driver pref line</text:p>
          </table:table-cell>
          <table:table-cell/>
          <table:table-cell table:style-name="Default"/>
          <table:table-cell table:formula="of:=IF(OR([.L29]&lt;[.F29];[.L29]&gt;[.I29]);-1; IF([.L29]&lt;[.G29]; 2; IF([.L29]&lt;=[.H29]; 3; 4)))" office:value-type="float" office:value="-1" calcext:value-type="float">
            <text:p>-1</text:p>
          </table:table-cell>
          <table:table-cell table:formula="of:=IF([.M29]=-1; IF([.L29]&gt;[.I29]; -(([.L29]-[.I29])/[.I29])*100; -(([.F29]-[.L29])/[.F29])*100); IF([.M29]=2; (([.L29]-[.F29])/([.G29]-[.F29]))*100; IF([.M29]=3; 100; (([.I29]-[.L29])/([.I29]-[.H29]))*100)))" office:value-type="float" office:value="-100" calcext:value-type="float">
            <text:p>-100,00</text:p>
          </table:table-cell>
          <table:table-cell table:style-name="ce77" table:formula="of:=[.N29] * [.E29]" office:value-type="float" office:value="-100" calcext:value-type="float">
            <text:p>-1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PrefTech</text:p>
          </table:table-cell>
          <table:table-cell/>
          <table:table-cell office:value-type="string" calcext:value-type="string">
            <text:p>per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,0</text:p>
          </table:table-cell>
          <table:table-cell table:style-name="ce51"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@driver pref tech</text:p>
          </table:table-cell>
          <table:table-cell/>
          <table:table-cell table:style-name="Default"/>
          <table:table-cell table:formula="of:=IF(OR([.L30]&lt;[.F30];[.L30]&gt;[.I30]);-1; IF([.L30]&lt;[.G30]; 2; IF([.L30]&lt;=[.H30]; 3; 4)))" office:value-type="float" office:value="-1" calcext:value-type="float">
            <text:p>-1</text:p>
          </table:table-cell>
          <table:table-cell table:formula="of:=IF([.M30]=-1; IF([.L30]&gt;[.I30]; -(([.L30]-[.I30])/[.I30])*100; -(([.F30]-[.L30])/[.F30])*100); IF([.M30]=2; (([.L30]-[.F30])/([.G30]-[.F30]))*100; IF([.M30]=3; 100; (([.I30]-[.L30])/([.I30]-[.H30]))*100)))" office:value-type="float" office:value="-100" calcext:value-type="float">
            <text:p>-100,00</text:p>
          </table:table-cell>
          <table:table-cell table:style-name="ce77" table:formula="of:=[.N30] * [.E30]" office:value-type="float" office:value="-100" calcext:value-type="float">
            <text:p>-100,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51"/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51"/>
          <table:table-cell table:number-columns-repeated="5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 style:data-style-name="N2" text:time-value="09:21:03.4163016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6T14:28:28.611797602</dc:date>
    <meta:editing-duration>PT6H21M43S</meta:editing-duration>
    <meta:editing-cycles>69</meta:editing-cycles>
    <meta:generator>LibreOffice/26.2.3.2$Linux_X86_64 LibreOffice_project/d4d5ed47b6084125f28d269a5650105d54dde034</meta:generator>
    <meta:document-statistic meta:table-count="3" meta:cell-count="1744" meta:object-count="0"/>
  </office:meta>
</office:document-meta>
</file>