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5.184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5.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3.358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5.482cm"/>
    </style:style>
    <style:style style:name="co15" style:family="table-column">
      <style:table-column-properties fo:break-before="auto" style:column-width="3.223cm"/>
    </style:style>
    <style:style style:name="co16" style:family="table-column">
      <style:table-column-properties fo:break-before="auto" style:column-width="4.394cm"/>
    </style:style>
    <style:style style:name="co17" style:family="table-column">
      <style:table-column-properties fo:break-before="auto" style:column-width="5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5a92a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5a92af"/>
    </style:style>
    <style:style style:name="ce16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7bc65"/>
    </style:style>
    <style:style style:name="ce20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e994"/>
    </style:style>
    <style:style style:name="ce22" style:family="table-cell" style:parent-style-name="Default">
      <style:table-cell-properties fo:background-color="#b7b3ca"/>
    </style:style>
    <style:style style:name="ce23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ransit_sche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abela (@@map)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bservações</text:p>
          </table:table-cell>
          <table:table-cell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RBAN|METROPOLITAN|RURAL|SPECIAL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plan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RouteDirection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OUTBOUND|INBOUND|CIRCULAR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routeId+sequence)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null → usa TravelTimeMatrix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multiplicador em horário de pico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OSRM|MANUAL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override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overrid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 (&gt;1440 = madrugada)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string[], pinnedBlock?: string }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ehiclePlanStatus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DRAFT|ACTIVE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fleet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eadrun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gener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planId+blockNumber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planId+blockNumber)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blockId+sequence)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</table:table>
      <table:table table:name="Planilha2" table:style-name="ta1"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4" table:default-cell-style-name="ce3"/>
        <table:table-column table:style-name="co14" table:default-cell-style-name="ce3"/>
        <table:table-column table:style-name="co12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DayType</text:p>
          </table:table-cell>
          <table:table-cell table:style-name="ce10" table:number-columns-repeated="2"/>
          <table:table-cell/>
          <table:table-cell table:style-name="ce6" office:value-type="string" calcext:value-type="string">
            <text:p>TransitLine</text:p>
          </table:table-cell>
          <table:table-cell table:style-name="ce4" table:number-columns-repeated="2"/>
          <table:table-cell/>
          <table:table-cell table:style-name="ce9" office:value-type="string" calcext:value-type="string">
            <text:p>RouteLocality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/>
          <table:table-cell table:style-name="ce13" office:value-type="string" calcext:value-type="string">
            <text:p>routeId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1" office:value-type="string" calcext:value-type="string">
            <text:p>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ineType (enum)</text:p>
          </table:table-cell>
          <table:table-cell table:number-columns-repeated="2"/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routeId+sequ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s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planLines</text:p>
          </table:table-cell>
          <table:table-cell office:value-type="string" calcext:value-type="string">
            <text:p>VehiclePlanLin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 (Cascad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LineCalendarExceptionLin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linha de onibus, não tem amarração com empresa / filial, engine pode atribui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@ponto de referencia de uma linha, pode ser o ponto de origem ou ponto d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empresa (caso permitido pelo planejador)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ferência, allowsCrewChange = true força engine a calcular tempo e km na <text:s/>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@tipo de dia, permite diferenciar dias da semana e mês, pattern = nul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ravelTimeMatrix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spera associação manual na geração (Ferias, Especial, etc)</text:p>
          </table:table-cell>
          <table:table-cell table:style-name="Default" table:number-columns-repeated="2"/>
          <table:table-cell/>
          <table:table-cell table:style-name="ce18" office:value-type="string" calcext:value-type="string">
            <text:p>VehiclePlan</text:p>
          </table:table-cell>
          <table:table-cell table:style-name="ce19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3" office:value-type="string" calcext:value-type="string">
            <text:p>TransitRoute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>
            <text:p>LineCalendarException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10" office:value-type="string" calcext:value-type="string">
            <text:p>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ehiclePlanStatus (enum)</text:p>
          </table:table-cell>
          <table:table-cell office:value-type="string" calcext:value-type="string">
            <text:p>DRAFT|ACTIVE</text:p>
          </table:table-cell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direction</text:p>
          </table:table-cell>
          <table:table-cell office:value-type="string" calcext:value-type="string">
            <text:p>RouteDirection (enu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gener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ource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 locked?: true }</text:p>
          </table:table-cell>
          <table:table-cell/>
          <table:table-cell table:style-name="ce21" office:value-type="string" calcext:value-type="string">
            <text:p>origin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override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1" office:value-type="string" calcext:value-type="string">
            <text:p>destination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@resultado de uma execução do solver para um DayType, agrupa os VehicleBlock</text:p>
          </table:table-cell>
          <table:table-cell table:style-name="Default" table:number-columns-repeated="2"/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gerados sem amarração de empresa. Atribuição de empresa acontece no VehicleBlock</text:p>
          </table:table-cell>
          <table:table-cell table:style-name="Default" table:number-columns-repeated="2"/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table:style-name="ce9" office:value-type="string" calcext:value-type="string">
            <text:p>VehiclePlanLine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office:value-type="string" calcext:value-type="string">
            <text:p>origin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nes</text:p>
          </table:table-cell>
          <table:table-cell table:style-name="ce4" office:value-type="string" calcext:value-type="string">
            <text:p>LineCalendarExceptionLine[]</text:p>
          </table:table-cell>
          <table:table-cell table:style-name="ce4" office:value-type="string" calcext:value-type="string">
            <text:p>relation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destination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 (composto), FK</text:p>
          </table:table-cell>
          <table:table-cell/>
          <table:table-cell table:style-name="ce19" office:value-type="string" calcext:value-type="string">
            <text:p>vehiclePlanId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PK (composto), FK</text:p>
          </table:table-cell>
          <table:table-cell/>
          <table:table-cell office:value-type="string" calcext:value-type="string">
            <text:p>localities</text:p>
          </table:table-cell>
          <table:table-cell office:value-type="string" calcext:value-type="string">
            <text:p>RouteLocality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 (composto), FK</text:p>
          </table:table-cell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PK (composto), FK</text:p>
          </table:table-cell>
          <table:table-cell/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office:value-type="string" calcext:value-type="string">
            <text:p>relation (Cascade)</text:p>
          </table:table-cell>
          <table:table-cell/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relation (Cascade)</text:p>
          </table:table-cell>
          <table:table-cell/>
          <table:table-cell table:style-name="Default" office:value-type="string" calcext:value-type="string">
            <text:p>@rota (sentido) de uma linh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@registra periodo de exceção, tem precedencia no engine para definição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@agrupa VehiclePlan – VehicleBlock, para agilizar consulta nas tela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do daytype, </text:span>se existe definição de exceção para linha usa ela, se não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 planejamento</text:p>
          </table:table-cell>
          <table:table-cell table:style-name="Default" table:number-columns-repeated="2"/>
          <table:table-cell/>
          <table:table-cell table:style-name="ce24" office:value-type="string" calcext:value-type="string">
            <text:p>TransitLocality</text:p>
          </table:table-cell>
          <table:table-cell table:style-name="ce21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assume default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0" office:value-type="string" calcext:value-type="string">
            <text:p>VehicleBlock</text:p>
          </table:table-cell>
          <table:table-cell table:style-name="ce22"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TransitTrip</text:p>
          </table:table-cell>
          <table:table-cell table:style-name="ce15" table:number-columns-repeated="2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19" office:value-type="string" calcext:value-type="string">
            <text:p>vehiclePlanId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FK, unique(planId+blockNumber)</text:p>
          </table:table-cell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routeId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FK</text:p>
          </table:table-cell>
          <table:table-cell/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planId+blockNumber)</text:p>
          </table:table-cell>
          <table:table-cell/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21" office:value-type="string" calcext:value-type="string">
            <text:p>depot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 locked?: true }</text:p>
          </table:table-cell>
          <table:table-cell/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relation (Cascade)</text:p>
          </table:table-cell>
          <table:table-cell/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ponto nomeado da rede, terminal, parada de referência ou garagem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@atomo que o solver consome para montar os blocos de veículo,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@sequência de viagens executadas por um único veículo em um dia operacional, 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Global, sem vínculo com empresa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representa uma viagem “solta” nos projetos, referencia um daytype 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sai da garagem, cumpre N viagens em ordem, retorna. Aqui entra a empresa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uma linh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sponsável por alocar o veículo</text:p>
          </table:table-cell>
          <table:table-cell table:style-name="Default" table:number-columns-repeated="2"/>
          <table:table-cell/>
          <table:table-cell table:style-name="ce9" office:value-type="string" calcext:value-type="string">
            <text:p>TravelTimeMatrix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9" office:value-type="string" calcext:value-type="string">
            <text:p>BlockTrip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1" office:value-type="string" calcext:value-type="string">
            <text:p>origin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, unique(origin+dest)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21" office:value-type="string" calcext:value-type="string">
            <text:p>destination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, unique(origin+dest)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2" office:value-type="string" calcext:value-type="string">
            <text:p>vehicleBlockI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FK</text:p>
          </table:table-cell>
          <table:table-cell/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ce15" office:value-type="string" calcext:value-type="string">
            <text:p>tripId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FK</text:p>
          </table:table-cell>
          <table:table-cell/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blockId+sequence)</text:p>
          </table:table-cell>
          <table:table-cell/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ultiplicador em horário de pico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OSRM|MANUAL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relation (Cascade)</text:p>
          </table:table-cell>
          <table:table-cell/>
          <table:table-cell table:style-name="Default" office:value-type="string" calcext:value-type="string">
            <text:p>@ Matriz global de tempo e distância entre pares de localidades, alimenta o solve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para cálculo de dead runs e serve de fallback para itinerários sem delta manual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@uma viagem dentro de um bloco de veículo, comercial ou em vazio, com sua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posição na sequência e dados do deslocamento morto quando aplicáve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 style:data-style-name="N2" text:time-value="10:27:44.7336354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31T11:24:09.347653382</dc:date>
    <meta:editing-duration>PT1H32M37S</meta:editing-duration>
    <meta:editing-cycles>38</meta:editing-cycles>
    <meta:generator>LibreOffice/26.2.3.2$Linux_X86_64 LibreOffice_project/d4d5ed47b6084125f28d269a5650105d54dde034</meta:generator>
    <meta:document-statistic meta:table-count="2" meta:cell-count="1477" meta:object-count="0"/>
  </office:meta>
</office:document-meta>
</file>